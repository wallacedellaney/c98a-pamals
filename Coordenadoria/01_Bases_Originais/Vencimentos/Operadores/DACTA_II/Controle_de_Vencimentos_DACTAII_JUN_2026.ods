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6.70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48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6.828cm"/>
    </style:style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1.72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Controle_20_de_20_Vencimento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add8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90ee9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ffe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1" fo:font-size="11pt" style:font-size-asian="11pt" style:font-size-complex="11pt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1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e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c1c1c" style:font-name="Calibri1" fo:font-size="11pt" style:font-size-asian="11pt" style:font-size-complex="11pt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font-name="Calibri1" fo:font-size="11pt" style:font-size-asian="11pt" style:font-name-complex="Mangal" style:font-size-complex="11pt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11111" style:font-name="Calibri1" fo:font-size="11pt" style:font-size-asian="11pt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111111" style:font-name="Calibri1" fo:font-size="11pt" style:font-name-asian="Microsoft YaHei" style:font-size-asian="11pt" style:font-name-complex="Calibri2" style:font-size-complex="11pt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add8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ackground-color="#90ee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ackground-color="#ffff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29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fo:font-weight="bold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16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Calibri1" fo:font-size="11pt" style:font-size-asian="11pt" style:font-size-complex="11pt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3333" style:font-name="Calibri1" fo:font-size="11pt" style:font-size-asian="11pt" style:font-size-complex="11pt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8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39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>
        <loext:char-complex-color loext:theme-type="dark1" loext:color-type="theme"/>
      </style:text-properties>
    </style:style>
    <style:style style:name="ce40" style:family="table-cell" style:parent-style-name="Default" style:data-style-name="N223">
      <style:table-cell-properties fo:background-color="#90ee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23">
      <style:table-cell-properties fo:background-color="#ffff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use-window-font-color="true" style:font-name="Calibri1" fo:font-size="11pt" style:font-size-asian="11pt" style:font-size-complex="11pt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erif" fo:font-size="10pt" style:font-name-asian="Segoe UI1" style:font-size-asian="10pt" style:font-name-complex="Tahoma" style:font-size-complex="10pt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37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47" style:family="table-cell" style:parent-style-name="Default" style:data-style-name="N30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48" style:family="table-cell" style:parent-style-name="Default" style:data-style-name="N37">
      <style:table-cell-properties fo:background-color="#ffffff" style:text-align-source="fix" style:repeat-content="false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106" style:family="table-cell" style:parent-style-name="Default">
      <style:table-cell-properties style:vertical-align="middle"/>
    </style:style>
    <style:style style:name="ce49" style:family="table-cell" style:parent-style-name="Default" style:data-style-name="N37">
      <style:text-properties fo:color="#ffffff">
        <loext:char-complex-color loext:theme-type="dark1" loext:color-type="theme"/>
      </style:text-properties>
    </style:style>
    <style:style style:name="ce111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4000">
        <loext:char-complex-color loext:theme-type="dark1" loext:color-type="theme"/>
      </style:text-properties>
    </style:style>
    <style:style style:name="ce50" style:family="table-cell" style:parent-style-name="Default" style:data-style-name="N2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53" style:family="table-cell" style:parent-style-name="Default">
      <style:table-cell-properties fo:background-color="#ffffff"/>
      <style:text-properties style:font-name="Calibri1" fo:font-size="11pt" style:font-size-asian="11pt" style:font-size-complex="11pt"/>
    </style:style>
    <style:style style:name="ce54" style:family="table-cell" style:parent-style-name="Default">
      <style:text-properties style:font-name="Calibri1" fo:font-size="11pt" style:font-size-asian="11pt" style:font-size-complex="11pt"/>
    </style:style>
    <style:style style:name="ce5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color="#ff3333" style:font-name="Calibri1" fo:font-size="11pt" fo:font-weight="bold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ffff" fo:border="none"/>
      <style:text-properties style:font-name="Calibri1" fo:font-size="11pt" style:font-size-asian="11pt" style:font-size-complex="11pt"/>
    </style:style>
    <style:style style:name="ce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ackground-color="#ffffff" fo:border="none" style:vertical-align="middle"/>
      <style:text-properties style:font-name="Calibri1" fo:font-size="11pt" style:font-size-asian="11pt" style:font-size-complex="11pt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2.769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61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976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role de Vencimentos" table:style-name="ta1" table:print-ranges="'Controle de Vencimentos'.A1:'Controle de Vencimentos'.I6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1" table:number-columns-repeated="16373"/>
        <table:table-row table:style-name="ro1">
          <table:table-cell table:style-name="ce2" office:value-type="string" calcext:value-type="string">
            <text:p>ESPECIALIDADE</text:p>
          </table:table-cell>
          <table:table-cell table:style-name="ce2" office:value-type="string" calcext:value-type="string">
            <text:p>NOMENCLATURA DO ITEM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AERONAVE</text:p>
          </table:table-cell>
          <table:table-cell table:style-name="ce2" office:value-type="string" calcext:value-type="string">
            <office:annotation draw:style-name="gr1" draw:text-style-name="P2" svg:width="5.121cm" svg:height="2.969cm" svg:x="10.784cm" svg:y="0.053cm" draw:caption-point-x="13.971cm" draw:caption-point-y="-0.043cm">
              <dc:creator>Autor desconhecido</dc:creator>
              <dc:date>2025-11-12T09:55:00</dc:date>
              <text:p text:style-name="P1"><text:span text:style-name="T1">Tempo restante (horas, pousos, meses/anos) até o próximo vencimento. Formato: HH:MM para horas, "X Pousos" para pousos, "X Meses" ou "X Anos" para calendário.</text:span></text:p>
            </office:annotation>
            <text:p>DISPONIBILIDADE</text:p>
          </table:table-cell>
          <table:table-cell table:style-name="ce2" office:value-type="string" calcext:value-type="string">
            <office:annotation draw:style-name="gr2" draw:text-style-name="P2" svg:width="5.108cm" svg:height="1.81cm" svg:x="12.161cm" svg:y="0.053cm" draw:caption-point-x="18.618cm" draw:caption-point-y="-0.043cm">
              <dc:creator>Autor desconhecido</dc:creator>
              <dc:date>2025-11-12T09:55:00</dc:date>
              <text:p text:style-name="P1"><text:span text:style-name="T1">Data estimada do vencimento do item. Formato: MMM/AAAA (ex: Jan/2026).</text:span></text:p>
            </office:annotation>
            <text:p>DATA ESTIMADA DO VENCIMENTO</text:p>
          </table:table-cell>
          <table:table-cell table:style-name="ce100" office:value-type="string" calcext:value-type="string">
            <office:annotation draw:style-name="gr2" draw:text-style-name="P2" svg:width="5.126cm" svg:height="1.81cm" svg:x="16.164cm" svg:y="0.053cm" draw:caption-point-x="21.443cm" draw:caption-point-y="-0.043cm">
              <dc:creator>Autor desconhecido</dc:creator>
              <dc:date>2025-11-12T09:55:00</dc:date>
              <text:p text:style-name="P1"><text:span text:style-name="T1">Número de referência para pedidos ou emergências, se aplicável. Opcional.</text:span></text:p>
            </office:annotation>
            <text:p>N° EMERGÊNCIA / N° PEDIDO NORMAL / N° PEDIDO DE TRANSFERÊNCIA</text:p>
          </table:table-cell>
          <table:table-cell table:style-name="ce2" office:value-type="string" calcext:value-type="string">
            <office:annotation draw:style-name="gr3" draw:text-style-name="P2" svg:width="5.1cm" svg:height="2.176cm" svg:x="21.72cm" svg:y="0.053cm" draw:caption-point-x="25.075cm" draw:caption-point-y="-0.043cm">
              <dc:creator>Autor desconhecido</dc:creator>
              <dc:date>2025-11-12T09:55:00</dc:date>
              <text:p text:style-name="P1"><text:span text:style-name="T1">Observações adicionais sobre o item ou o tipo de vencimento (ex: HSI 1500H, TBO 2000H, Vencimento Anual, TLV 5 Anos).</text:span></text:p>
            </office:annotation>
            <text:p>OBS</text:p>
          </table:table-cell>
          <table:table-cell table:style-name="ce106" table:number-columns-repeated="16375"/>
        </table:table-row>
        <table:table-row table:style-name="ro2">
          <table:table-cell table:style-name="ce3" office:value-type="string" calcext:value-type="string">
            <text:p>POR HORA</text:p>
          </table:table-cell>
          <table:table-cell table:style-name="ce3" table:number-columns-repeated="2"/>
          <table:table-cell table:style-name="ce19" table:number-columns-repeated="5"/>
          <table:table-cell table:style-name="ce3"/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ENGINE PT6A-114A</text:p>
          </table:table-cell>
          <table:table-cell table:style-name="ce16" office:value-type="float" office:value="3044000" calcext:value-type="float">
            <text:p>3044000</text:p>
          </table:table-cell>
          <table:table-cell office:value-type="string" calcext:value-type="string">
            <text:p>PCE-PC074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6]" office:value-type="time" office:time-value="PT3321H34M59.999999999S" calcext:value-type="time">
            <text:p>3321:35</text:p>
          </table:table-cell>
          <table:table-cell table:style-name="ce38" office:value-type="date" office:date-value="2033-10-01" calcext:value-type="date">
            <text:p>out/2033</text:p>
          </table:table-cell>
          <table:table-cell/>
          <table:table-cell office:value-type="string" calcext:value-type="string">
            <text:p>TBO 4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HSI ENGINE PT6A-114A</text:p>
          </table:table-cell>
          <table:table-cell table:style-name="ce16" office:value-type="float" office:value="3044000" calcext:value-type="float">
            <text:p>3044000</text:p>
          </table:table-cell>
          <table:table-cell office:value-type="string" calcext:value-type="string">
            <text:p>PCE-PC074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7]" office:value-type="time" office:time-value="PT1467H05M00S" calcext:value-type="time">
            <text:p>1467:0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HSI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BLEED VALVE</text:p>
          </table:table-cell>
          <table:table-cell table:style-name="ce16" office:value-type="string" calcext:value-type="string">
            <text:p>540-1407-4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8]" office:value-type="time" office:time-value="PT5303H54M59.999999998S" calcext:value-type="time">
            <text:p>5303:5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BLEED VALVE</text:p>
          </table:table-cell>
          <table:table-cell table:style-name="ce16" office:value-type="string" calcext:value-type="string">
            <text:p>540-1407-4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67H05M00S" calcext:value-type="time">
            <text:p>1467:0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PUMP FUEL</text:p>
          </table:table-cell>
          <table:table-cell table:style-name="ce16" office:value-type="string" calcext:value-type="string">
            <text:p>025323-15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6]" office:value-type="time" office:time-value="PT4971H19M59.999999999S" calcext:value-type="time">
            <text:p>4971:2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PROPELLER GOVERNOR</text:p>
          </table:table-cell>
          <table:table-cell table:style-name="ce16" office:value-type="string" calcext:value-type="string">
            <text:p>8210-002-01</text:p>
          </table:table-cell>
          <table:table-cell office:value-type="float" office:value="16995530" calcext:value-type="float">
            <text:p>16995530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7]" office:value-type="time" office:time-value="PT638H55M00S" calcext:value-type="time">
            <text:p>638:5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CONTROL UNIT (IC)</text:p>
          </table:table-cell>
          <table:table-cell table:style-name="ce16" office:value-type="string" calcext:value-type="string">
            <text:p>3244897-4</text:p>
          </table:table-cell>
          <table:table-cell office:value-type="string" calcext:value-type="string">
            <text:p>C66322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8]" office:value-type="time" office:time-value="PT2792H40M00.000000001S" calcext:value-type="time">
            <text:p>2792:40</text:p>
          </table:table-cell>
          <table:table-cell table:style-name="ce38" office:value-type="date" office:date-value="2033-09-02" calcext:value-type="date">
            <text:p>set/2033</text:p>
          </table:table-cell>
          <table:table-cell/>
          <table:table-cell office:value-type="string" calcext:value-type="string">
            <text:p>IC 3000H OU 08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CONTROL UNIT (TBO)</text:p>
          </table:table-cell>
          <table:table-cell table:style-name="ce16" office:value-type="string" calcext:value-type="string">
            <text:p>3244897-4</text:p>
          </table:table-cell>
          <table:table-cell office:value-type="string" calcext:value-type="string">
            <text:p>C66322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19]" office:value-type="time" office:time-value="PT2275H00M00S" calcext:value-type="time">
            <text:p>2275:00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EATER</text:p>
          </table:table-cell>
          <table:table-cell table:style-name="ce16" office:value-type="string" calcext:value-type="string">
            <text:p>10552E</text:p>
          </table:table-cell>
          <table:table-cell office:value-type="string" calcext:value-type="string">
            <text:p>WA13686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20]" office:value-type="time" office:time-value="PT4821H34M59.999999999S" calcext:value-type="time">
            <text:p>4821:35</text:p>
          </table:table-cell>
          <table:table-cell table:style-name="ce38" office:value-type="date" office:date-value="2034-10-01" calcext:value-type="date">
            <text:p>out/2034</text:p>
          </table:table-cell>
          <table:table-cell/>
          <table:table-cell office:value-type="string" calcext:value-type="string">
            <text:p>TBO 5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ÉLICE</text:p>
          </table:table-cell>
          <table:table-cell office:value-type="string" calcext:value-type="string">
            <text:p>HÉLICE MCCAULEY</text:p>
          </table:table-cell>
          <table:table-cell table:style-name="ce16" office:value-type="string" calcext:value-type="string">
            <text:p>P7036368-0383</text:p>
          </table:table-cell>
          <table:table-cell office:value-type="float" office:value="971366" calcext:value-type="float">
            <text:p>971366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2]" office:value-type="time" office:time-value="PT3628H10M00.000000003S" calcext:value-type="time">
            <text:p>3628:10</text:p>
          </table:table-cell>
          <table:table-cell table:style-name="ce38" office:value-type="date" office:date-value="2031-09-01" calcext:value-type="date">
            <text:p>set/2031</text:p>
          </table:table-cell>
          <table:table-cell/>
          <table:table-cell office:value-type="string" calcext:value-type="string">
            <text:p>TBO 4000H OU 06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ÉLICE</text:p>
          </table:table-cell>
          <table:table-cell office:value-type="string" calcext:value-type="string">
            <text:p>PROP. OVERSPEED GOVERNOR</text:p>
          </table:table-cell>
          <table:table-cell table:style-name="ce16" office:value-type="string" calcext:value-type="string">
            <text:p>D210507</text:p>
          </table:table-cell>
          <table:table-cell office:value-type="float" office:value="18294974" calcext:value-type="float">
            <text:p>18294974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3]" office:value-type="time" office:time-value="PT779H35M00S" calcext:value-type="time">
            <text:p>779:35</text:p>
          </table:table-cell>
          <table:table-cell table:style-name="ce38" office:value-type="date" office:date-value="2028-03-17" calcext:value-type="date">
            <text:p>mar/2028</text:p>
          </table:table-cell>
          <table:table-cell/>
          <table:table-cell office:value-type="string" calcext:value-type="string">
            <text:p>TBO 6500H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61" office:value-type="string" calcext:value-type="string">
            <text:p>CÉLULA</text:p>
          </table:table-cell>
          <table:table-cell table:style-name="ce61" office:value-type="string" calcext:value-type="string">
            <text:p>BOMBA CIRCULAÇÃO TKS PRINC</text:p>
          </table:table-cell>
          <table:table-cell table:style-name="ce74" office:value-type="string" calcext:value-type="string">
            <text:p>9514A-1</text:p>
          </table:table-cell>
          <table:table-cell table:style-name="ce79" office:value-type="string" calcext:value-type="string">
            <text:p>CAVI12B308</text:p>
          </table:table-cell>
          <table:table-cell table:style-name="ce79" office:value-type="string" calcext:value-type="string">
            <text:p>FAB 2742</text:p>
          </table:table-cell>
          <table:table-cell table:style-name="ce89" table:formula="of:=['file:///R:/SUBCOMANDO/3.SCAV/PLACON/2026_nova/CONTROLE_INSPE%C3%87%C3%95ES_VENCIMENTOS.ods'#$'Controle_de_Vencimentos_C-98_CINDACTA-II'.G27]" office:value-type="time" office:time-value="-PT720H25M00S" calcext:value-type="time">
            <text:p>-720:25</text:p>
          </table:table-cell>
          <table:table-cell table:style-name="ce104" office:value-type="date" office:date-value="2025-12-12" calcext:value-type="date">
            <text:p>dez/2025</text:p>
          </table:table-cell>
          <table:table-cell table:style-name="ce114" office:value-type="string" calcext:value-type="string">
            <text:p><text:s/>(chegou uma bomba, será instalada quando a outra bomba chegar e o sistema tks estiver operante)</text:p>
          </table:table-cell>
          <table:table-cell table:style-name="ce61" office:value-type="string" calcext:value-type="string">
            <text:p>TLV 5000H (AT384%165 =&gt; +500H) (TKS INOP)</text:p>
          </table:table-cell>
          <table:table-cell table:style-name="ce106" table:number-columns-repeated="16375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BOMBA CIRCULAÇÃO TKS AUX</text:p>
          </table:table-cell>
          <table:table-cell table:style-name="ce16" office:value-type="string" calcext:value-type="string">
            <text:p>9514A-1</text:p>
          </table:table-cell>
          <table:table-cell office:value-type="string" calcext:value-type="string">
            <text:p>CAVI12B309</text:p>
          </table:table-cell>
          <table:table-cell office:value-type="string" calcext:value-type="string">
            <text:p>FAB 2742</text:p>
          </table:table-cell>
          <table:table-cell table:style-name="ce29" table:formula="of:=['file:///R:/SUBCOMANDO/3.SCAV/PLACON/2026_nova/CONTROLE_INSPE%C3%87%C3%95ES_VENCIMENTOS.ods'#$'Controle_de_Vencimentos_C-98_CINDACTA-II'.G28]" office:value-type="time" office:time-value="-PT720H25M00S" calcext:value-type="time">
            <text:p>-720:25</text:p>
          </table:table-cell>
          <table:table-cell table:style-name="ce39" office:value-type="date" office:date-value="2025-12-12" calcext:value-type="date">
            <text:p>dez/2025</text:p>
          </table:table-cell>
          <table:table-cell table:style-name="ce122" office:value-type="float" office:value="384260009381" calcext:value-type="float">
            <text:p>384260009381</text:p>
          </table:table-cell>
          <table:table-cell office:value-type="string" calcext:value-type="string">
            <text:p>TLV 5000H (AT384%165 =&gt; +500H) (TKS INOP)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COLLAR</text:p>
          </table:table-cell>
          <table:table-cell table:style-name="ce16" office:value-type="string" calcext:value-type="string">
            <text:p>2651022-20</text:p>
          </table:table-cell>
          <table:table-cell office:value-type="string" calcext:value-type="string">
            <text:p>JHZ-23-069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4]" office:value-type="time" office:time-value="PT4628H09M59.999999998S" calcext:value-type="time">
            <text:p>4628:1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COLLAR</text:p>
          </table:table-cell>
          <table:table-cell table:style-name="ce16" office:value-type="string" calcext:value-type="string">
            <text:p>2651022-20</text:p>
          </table:table-cell>
          <table:table-cell office:value-type="string" calcext:value-type="string">
            <text:p>JHZ-23-069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67H05M00S" calcext:value-type="time">
            <text:p>1467:0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MOUNT ASSEMBLY</text:p>
          </table:table-cell>
          <table:table-cell table:style-name="ce16" office:value-type="string" calcext:value-type="string">
            <text:p>2651023-23</text:p>
          </table:table-cell>
          <table:table-cell office:value-type="string" calcext:value-type="string">
            <text:p>PZL/09/133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4]" office:value-type="time" office:time-value="PT4628H09M59.999999998S" calcext:value-type="time">
            <text:p>4628:10</text:p>
          </table:table-cell>
          <table:table-cell table:style-name="ce38" office:value-type="date" office:date-value="2037-10-01" calcext:value-type="date">
            <text:p>out/2037</text:p>
          </table:table-cell>
          <table:table-cell/>
          <table:table-cell office:value-type="string" calcext:value-type="string">
            <text:p>TBO 5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NGINE MOUNT ASSEMBLY</text:p>
          </table:table-cell>
          <table:table-cell table:style-name="ce16" office:value-type="string" calcext:value-type="string">
            <text:p>2651023-23</text:p>
          </table:table-cell>
          <table:table-cell office:value-type="string" calcext:value-type="string">
            <text:p>PZL/09/133</text:p>
          </table:table-cell>
          <table:table-cell office:value-type="string" calcext:value-type="string">
            <text:p>FAB 2742</text:p>
          </table:table-cell>
          <table:table-cell table:style-name="ce28" table:formula="of:=[.F4]" office:value-type="time" office:time-value="PT1467H05M00S" calcext:value-type="time">
            <text:p>1467:05</text:p>
          </table:table-cell>
          <table:table-cell table:style-name="ce38" office:value-type="date" office:date-value="2028-10-01" calcext:value-type="date">
            <text:p>out/2028</text:p>
          </table:table-cell>
          <table:table-cell/>
          <table:table-cell office:value-type="string" calcext:value-type="string">
            <text:p>IC 15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ÉTRICA</text:p>
          </table:table-cell>
          <table:table-cell office:value-type="string" calcext:value-type="string">
            <text:p>STARTER GENERATOR</text:p>
          </table:table-cell>
          <table:table-cell table:style-name="ce16" office:value-type="string" calcext:value-type="string">
            <text:p>200SGL119Q-2</text:p>
          </table:table-cell>
          <table:table-cell office:value-type="string" calcext:value-type="string">
            <text:p>S00096XL</text:p>
          </table:table-cell>
          <table:table-cell office:value-type="string" calcext:value-type="string">
            <text:p>FAB 2742</text:p>
          </table:table-cell>
          <table:table-cell table:style-name="ce28" table:formula="of:=['file:///R:/SUBCOMANDO/3.SCAV/PLACON/2026_nova/CONTROLE_INSPE%C3%87%C3%95ES_VENCIMENTOS.ods'#$'Controle_de_Vencimentos_C-98_CINDACTA-II'.G36]" office:value-type="time" office:time-value="PT1274H35M00S" calcext:value-type="time">
            <text:p>1274:35</text:p>
          </table:table-cell>
          <table:table-cell table:style-name="ce38" office:value-type="date" office:date-value="2028-12-01" calcext:value-type="date">
            <text:p>dez/2028</text:p>
          </table:table-cell>
          <table:table-cell/>
          <table:table-cell office:value-type="string" calcext:value-type="string">
            <text:p>TBO 2000H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SUPORTE DO FILTRO AR SIST. VÁCUO</text:p>
          </table:table-cell>
          <table:table-cell table:style-name="ce16" office:value-type="string" calcext:value-type="string">
            <text:p>1201075-4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AB 2742</text:p>
          </table:table-cell>
          <table:table-cell table:style-name="ce28" office:value-type="time" office:time-value="PT400H00M00S" calcext:value-type="time">
            <text:p>400:00</text:p>
          </table:table-cell>
          <table:table-cell table:style-name="ce38" office:value-type="date" office:date-value="2026-06-01" calcext:value-type="date">
            <text:p>jun/2026</text:p>
          </table:table-cell>
          <table:table-cell office:value-type="string" calcext:value-type="string">
            <text:p>TEMOS EM ESTOQUE</text:p>
          </table:table-cell>
          <table:table-cell office:value-type="string" calcext:value-type="string">
            <text:p><text:s/>IC 400H OU 1 ANO (TROCA DO FILTRO D9-18-1)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VÁLVULA ALÍVIO VÁCUO</text:p>
          </table:table-cell>
          <table:table-cell table:style-name="ce16" office:value-type="string" calcext:value-type="string">
            <text:p>C482001-0402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AB 2742</text:p>
          </table:table-cell>
          <table:table-cell table:style-name="ce28" office:value-type="time" office:time-value="PT400H00M00S" calcext:value-type="time">
            <text:p>400:00</text:p>
          </table:table-cell>
          <table:table-cell table:style-name="ce38" office:value-type="date" office:date-value="2026-06-02" calcext:value-type="date">
            <text:p>jun/2026</text:p>
          </table:table-cell>
          <table:table-cell office:value-type="string" calcext:value-type="string">
            <text:p>TEMOS EM ESTOQUE</text:p>
          </table:table-cell>
          <table:table-cell office:value-type="string" calcext:value-type="string">
            <text:p>IC 400H OU 1 ANO (TROCA DO FILTRO B3-5-1)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2">
          <table:table-cell table:number-columns-repeated="6"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5" office:value-type="string" calcext:value-type="string">
            <text:p>POR POUSO</text:p>
          </table:table-cell>
          <table:table-cell table:style-name="ce5" table:number-columns-repeated="2"/>
          <table:table-cell table:style-name="ce21" table:number-columns-repeated="3"/>
          <table:table-cell table:style-name="ce40"/>
          <table:table-cell table:style-name="ce21"/>
          <table:table-cell table:style-name="ce5"/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3]&amp;&quot; Pousos&quot;" office:value-type="string" office:string-value="27376 Pousos" calcext:value-type="string">
            <text:p>27376 Pousos</text:p>
          </table:table-cell>
          <table:table-cell table:style-name="ce38" office:value-type="string" calcext:value-type="string">
            <text:p>ASD</text:p>
          </table:table-cell>
          <table:table-cell/>
          <table:table-cell office:value-type="string" calcext:value-type="string">
            <text:p>TLV 315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TREM DE POUSO AUXILIAR</text:p>
          </table:table-cell>
          <table:table-cell office:value-type="string" calcext:value-type="string">
            <text:p>2643100-206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B68]&amp;&quot; Pousos&quot;" office:value-type="string" office:string-value="5876 Pousos" calcext:value-type="string">
            <text:p>5876 Pousos</text:p>
          </table:table-cell>
          <table:table-cell table:style-name="ce38" office:value-type="date" office:date-value="2041-11-01" calcext:value-type="date">
            <text:p>nov/2041</text:p>
          </table:table-cell>
          <table:table-cell/>
          <table:table-cell office:value-type="string" calcext:value-type="string">
            <text:p>TBO 10000P</text:p>
          </table:table-cell>
          <table:table-cell table:number-columns-repeated="2"/>
          <table:table-cell table:style-name="Default" table:number-columns-repeated="16373"/>
        </table:table-row>
        <table:table-row table:style-name="ro3">
          <table:table-cell table:style-name="ce61" office:value-type="string" calcext:value-type="string">
            <text:p>HIDRÁULICA</text:p>
          </table:table-cell>
          <table:table-cell table:style-name="ce61" office:value-type="string" calcext:value-type="string">
            <text:p>SEMICUBO AUX. INT. </text:p>
          </table:table-cell>
          <table:table-cell table:style-name="ce61" office:value-type="string" calcext:value-type="string">
            <text:p>161-11700</text:p>
          </table:table-cell>
          <table:table-cell table:style-name="ce79" office:value-type="float" office:value="792" calcext:value-type="float">
            <text:p>792</text:p>
          </table:table-cell>
          <table:table-cell table:style-name="ce79" office:value-type="string" calcext:value-type="string">
            <text:p>FAB 2742</text:p>
          </table:table-cell>
          <table:table-cell table:style-name="ce91" table:formula="of:=['file:///R:/SUBCOMANDO/3.SCAV/PLACON/2026_nova/CONTROLE_INSPE%C3%87%C3%95ES_VENCIMENTOS.ods'#$'Controle_de_Vencimentos_C-98_CINDACTA-II'.G50]&amp;&quot; Pousos&quot;" office:value-type="string" office:string-value="-160 Pousos" calcext:value-type="string">
            <text:p>-160 Pousos</text:p>
          </table:table-cell>
          <table:table-cell table:style-name="ce108" office:value-type="date" office:date-value="2025-12-01" calcext:value-type="date">
            <text:p>dez/2025</text:p>
          </table:table-cell>
          <table:table-cell table:style-name="ce114" office:value-type="string" calcext:value-type="string">
            <text:p>item recebido, será trocado na inspeção de julho</text:p>
          </table:table-cell>
          <table:table-cell table:style-name="ce61" office:value-type="string" calcext:value-type="string">
            <text:p>TBO 2000P (AT 384%175 =&gt; +200P) </text:p>
          </table:table-cell>
          <table:table-cell table:style-name="ce106" table:number-columns-repeated="16375"/>
        </table:table-row>
        <table:table-row table:style-name="ro3">
          <table:table-cell table:style-name="ce61" office:value-type="string" calcext:value-type="string">
            <text:p>HIDRÁULICA</text:p>
          </table:table-cell>
          <table:table-cell table:style-name="ce61" office:value-type="string" calcext:value-type="string">
            <text:p>SEMICUBO AUX. EXT. </text:p>
          </table:table-cell>
          <table:table-cell table:style-name="ce61" office:value-type="string" calcext:value-type="string">
            <text:p>162-10700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string" calcext:value-type="string">
            <text:p>FAB 2742</text:p>
          </table:table-cell>
          <table:table-cell table:style-name="ce91" table:formula="of:=['file:///R:/SUBCOMANDO/3.SCAV/PLACON/2026_nova/CONTROLE_INSPE%C3%87%C3%95ES_VENCIMENTOS.ods'#$'Controle_de_Vencimentos_C-98_CINDACTA-II'.G51]&amp;&quot; Pousos&quot;" office:value-type="string" office:string-value="-160 Pousos" calcext:value-type="string">
            <text:p>-160 Pousos</text:p>
          </table:table-cell>
          <table:table-cell table:style-name="ce108" office:value-type="date" office:date-value="2025-12-02" calcext:value-type="date">
            <text:p>dez/2025</text:p>
          </table:table-cell>
          <table:table-cell table:style-name="ce114" office:value-type="string" calcext:value-type="string">
            <text:p>item recebido, será trocado na inspeção de julho</text:p>
          </table:table-cell>
          <table:table-cell table:style-name="ce61" office:value-type="string" calcext:value-type="string">
            <text:p>TBO 2000P (AT 384%175 =&gt; +200P) </text:p>
          </table:table-cell>
          <table:table-cell table:style-name="ce106" table:number-columns-repeated="16375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INT. (DIR.)</text:p>
          </table:table-cell>
          <table:table-cell office:value-type="string" calcext:value-type="string">
            <text:p>161-12800</text:p>
          </table:table-cell>
          <table:table-cell office:value-type="string" calcext:value-type="string">
            <text:p>LSEAM3268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7]&amp;&quot; Pousos&quot;" office:value-type="string" office:string-value="1398 Pousos" calcext:value-type="string">
            <text:p>1398 Pousos</text:p>
          </table:table-cell>
          <table:table-cell table:style-name="ce38" office:value-type="date" office:date-value="2028-11-03" calcext:value-type="date">
            <text:p>nov/2028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EXT. (DIR.)</text:p>
          </table:table-cell>
          <table:table-cell office:value-type="string" calcext:value-type="string">
            <text:p>162-11800</text:p>
          </table:table-cell>
          <table:table-cell office:value-type="string" calcext:value-type="string">
            <text:p>B4H-479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8]&amp;&quot; Pousos&quot;" office:value-type="string" office:string-value="1398 Pousos" calcext:value-type="string">
            <text:p>1398 Pousos</text:p>
          </table:table-cell>
          <table:table-cell table:style-name="ce38" office:value-type="date" office:date-value="2028-11-04" calcext:value-type="date">
            <text:p>nov/2028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INT. (ESQ.)</text:p>
          </table:table-cell>
          <table:table-cell office:value-type="string" calcext:value-type="string">
            <text:p>161-128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1]&amp;&quot; Pousos&quot;" office:value-type="string" office:string-value="415 Pousos" calcext:value-type="string">
            <text:p>415 Pousos</text:p>
          </table:table-cell>
          <table:table-cell table:style-name="ce38" office:value-type="date" office:date-value="2026-12-05" calcext:value-type="date">
            <text:p>dez/2026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SEMICUBO PRINC. EXT. (ESQ.)</text:p>
          </table:table-cell>
          <table:table-cell office:value-type="string" calcext:value-type="string">
            <text:p>162-118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2]&amp;&quot; Pousos&quot;" office:value-type="string" office:string-value="524 Pousos" calcext:value-type="string">
            <text:p>524 Pousos</text:p>
          </table:table-cell>
          <table:table-cell table:style-name="ce38" office:value-type="date" office:date-value="2026-12-06" calcext:value-type="date">
            <text:p>dez/2026</text:p>
          </table:table-cell>
          <table:table-cell/>
          <table:table-cell office:value-type="string" calcext:value-type="string">
            <text:p>TBO 2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EIXO TREM PRINC (DIR)</text:p>
          </table:table-cell>
          <table:table-cell office:value-type="string" calcext:value-type="string">
            <text:p>2641011-5</text:p>
          </table:table-cell>
          <table:table-cell office:value-type="string" calcext:value-type="string">
            <text:p>4039-5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59]&amp;&quot; Pousos&quot;" office:value-type="string" office:string-value="876 Pousos" calcext:value-type="string">
            <text:p>876 Pousos</text:p>
          </table:table-cell>
          <table:table-cell table:style-name="ce38" office:value-type="date" office:date-value="2027-11-07" calcext:value-type="date">
            <text:p>nov/2027</text:p>
          </table:table-cell>
          <table:table-cell/>
          <table:table-cell office:value-type="string" calcext:value-type="string">
            <text:p>IC 5000P</text:p>
          </table:table-cell>
          <table:table-cell office:value-type="string" calcext:value-type="string">
            <text:p>PRIMEIRA IC 5000P (PRÓXIMAS 1000P)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EIXO TREM PRINC (ESQ)</text:p>
          </table:table-cell>
          <table:table-cell office:value-type="string" calcext:value-type="string">
            <text:p>2641011-5</text:p>
          </table:table-cell>
          <table:table-cell office:value-type="string" calcext:value-type="string">
            <text:p>4043-5</text:p>
          </table:table-cell>
          <table:table-cell office:value-type="string" calcext:value-type="string">
            <text:p>FAB 2742</text:p>
          </table:table-cell>
          <table:table-cell table:formula="of:=['file:///R:/SUBCOMANDO/3.SCAV/PLACON/2026_nova/CONTROLE_INSPE%C3%87%C3%95ES_VENCIMENTOS.ods'#$'Controle_de_Vencimentos_C-98_CINDACTA-II'.G60]&amp;&quot; Pousos&quot;" office:value-type="string" office:string-value="876 Pousos" calcext:value-type="string">
            <text:p>876 Pousos</text:p>
          </table:table-cell>
          <table:table-cell table:style-name="ce38" office:value-type="date" office:date-value="2027-11-08" calcext:value-type="date">
            <text:p>nov/2027</text:p>
          </table:table-cell>
          <table:table-cell/>
          <table:table-cell office:value-type="string" calcext:value-type="string">
            <text:p>IC 5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GUINHOL DO FLAP</text:p>
          </table:table-cell>
          <table:table-cell office:value-type="string" calcext:value-type="string">
            <text:p>2622311-16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FAB 2742</text:p>
          </table:table-cell>
          <table:table-cell table:formula="of:=[.F27]" office:value-type="string" office:string-value="5876 Pousos" calcext:value-type="string">
            <text:p>5876 Pousos</text:p>
          </table:table-cell>
          <table:table-cell table:style-name="ce38" office:value-type="date" office:date-value="2041-11-01" calcext:value-type="date">
            <text:p>nov/2041</text:p>
          </table:table-cell>
          <table:table-cell/>
          <table:table-cell office:value-type="string" calcext:value-type="string">
            <text:p>IC 10000P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6"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6" office:value-type="string" calcext:value-type="string">
            <text:p>POR CALENDÁRIO</text:p>
          </table:table-cell>
          <table:table-cell table:style-name="ce10" table:number-columns-repeated="2"/>
          <table:table-cell table:style-name="ce22" table:number-columns-repeated="3"/>
          <table:table-cell table:style-name="ce41"/>
          <table:table-cell table:style-name="ce22"/>
          <table:table-cell table:style-name="ce10"/>
          <table:table-cell table:style-name="ce49" table:formula="of:=TODAY()" office:value-type="date" office:date-value="2026-06-03" calcext:value-type="date">
            <text:p>03/06/26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style-name="ce87" table:formula="of:=IFERROR(&quot;- &quot;&amp;DATEDIF([.G39];[.J$38];&quot;m&quot;)&amp;&quot; Meses&quot;;DATEDIF([.J$38];[.G39];&quot;m&quot;)&amp;&quot; Meses&quot;)" office:value-type="string" office:string-value="9 Meses" calcext:value-type="string">
            <text:p>9 Meses</text:p>
          </table:table-cell>
          <table:table-cell table:style-name="ce38" office:value-type="date" office:date-value="2027-04-01" calcext:value-type="date">
            <text:p>abr/2027</text:p>
          </table:table-cell>
          <table:table-cell office:value-type="string" calcext:value-type="string">
            <text:p>APENAS INSPEÇÃO, NÃO NECESSITA TROCA</text:p>
          </table:table-cell>
          <table:table-cell office:value-type="string" calcext:value-type="string">
            <text:p>MEDIÇÃO FOLGA A CADA 12M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IDRÁULICA</text:p>
          </table:table-cell>
          <table:table-cell office:value-type="string" calcext:value-type="string">
            <text:p>CONJ TREM DE POUSO PRINCIPAL</text:p>
          </table:table-cell>
          <table:table-cell office:value-type="string" calcext:value-type="string">
            <text:p>DLS4-0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AB 2742</text:p>
          </table:table-cell>
          <table:table-cell table:style-name="ce87" table:formula="of:=IFERROR(&quot;- &quot;&amp;DATEDIF([.G40];[.J$38];&quot;m&quot;)&amp;&quot; Meses&quot;;DATEDIF([.J$38];[.G40];&quot;m&quot;)&amp;&quot; Meses&quot;)" office:value-type="string" office:string-value="33 Meses" calcext:value-type="string">
            <text:p>33 Meses</text:p>
          </table:table-cell>
          <table:table-cell table:style-name="ce38" office:value-type="date" office:date-value="2029-04-01" calcext:value-type="date">
            <text:p>abr/2029</text:p>
          </table:table-cell>
          <table:table-cell office:value-type="string" calcext:value-type="string">
            <text:p>APENAS INSPEÇÃO, NÃO NECESSITA TROCA</text:p>
          </table:table-cell>
          <table:table-cell office:value-type="string" calcext:value-type="string">
            <text:p>INSP03 (DESMONTAGEM TREM) A CADA 4ANOS (48MESES)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ETRÔNICA</text:p>
          </table:table-cell>
          <table:table-cell office:value-type="string" calcext:value-type="string">
            <text:p>BATTERY,NONRECHARGEABLE</text:p>
          </table:table-cell>
          <table:table-cell office:value-type="string" calcext:value-type="string">
            <text:p>452-0133</text:p>
          </table:table-cell>
          <table:table-cell office:value-type="string" calcext:value-type="string">
            <text:p>397401-005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1];[.J$38];&quot;m&quot;)&amp;&quot; Meses&quot;;DATEDIF([.J$38];[.G41];&quot;m&quot;)&amp;&quot; Meses&quot;)" office:value-type="string" office:string-value="15 Meses" calcext:value-type="string">
            <text:p>15 Meses</text:p>
          </table:table-cell>
          <table:table-cell table:style-name="ce38" office:value-type="date" office:date-value="2027-10-01" calcext:value-type="date">
            <text:p>out/2027</text:p>
          </table:table-cell>
          <table:table-cell/>
          <table:table-cell office:value-type="string" calcext:value-type="string">
            <text:p>TBO 60 MESE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EXTINGUISHER,FIRE</text:p>
          </table:table-cell>
          <table:table-cell office:value-type="string" calcext:value-type="string">
            <text:p>C352TS</text:p>
          </table:table-cell>
          <table:table-cell office:value-type="string" calcext:value-type="string">
            <text:p>E:09393138</text:p>
          </table:table-cell>
          <table:table-cell table:style-name="ce27" office:value-type="string" calcext:value-type="string">
            <text:p>FAB 2742</text:p>
          </table:table-cell>
          <table:table-cell table:style-name="ce30" table:formula="of:=IFERROR(&quot;- &quot;&amp;DATEDIF([.G42];[.J$38];&quot;m&quot;)&amp;&quot; Meses&quot;;DATEDIF([.J$38];[.G42];&quot;m&quot;)&amp;&quot; Meses&quot;)" office:value-type="string" office:string-value="0 Meses" calcext:value-type="string">
            <text:p>0 Meses</text:p>
          </table:table-cell>
          <table:table-cell table:style-name="ce38" office:value-type="date" office:date-value="2026-07-01" calcext:value-type="date">
            <text:p>jul/2026</text:p>
          </table:table-cell>
          <table:table-cell office:value-type="string" calcext:value-type="string">
            <text:p>ITEM RECEBIDO, SERÁ TROCADO ATÉ JULHO</text:p>
          </table:table-cell>
          <table:table-cell office:value-type="string" calcext:value-type="string">
            <text:p>TBO 12 ANOS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OSE TEFLON SUPPLY</text:p>
          </table:table-cell>
          <table:table-cell office:value-type="string" calcext:value-type="string">
            <text:p>AE3663726H0520 OU S2808-8B052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3];[.J$38];&quot;m&quot;)&amp;&quot; Meses&quot;;DATEDIF([.J$38];[.G43];&quot;m&quot;)&amp;&quot; Meses&quot;)" office:value-type="string" office:string-value="111 Meses" calcext:value-type="string">
            <text:p>111 Meses</text:p>
          </table:table-cell>
          <table:table-cell table:style-name="ce38" office:value-type="date" office:date-value="2035-10-01" calcext:value-type="date">
            <text:p>out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FUEL HOSE TEFLON MOTIVE FLOW</text:p>
          </table:table-cell>
          <table:table-cell office:value-type="string" calcext:value-type="string">
            <text:p>AE366372460330 OU S2808-6-033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4];[.J$38];&quot;m&quot;)&amp;&quot; Meses&quot;;DATEDIF([.J$38];[.G44];&quot;m&quot;)&amp;&quot; Meses&quot;)" office:value-type="string" office:string-value="112 Meses" calcext:value-type="string">
            <text:p>112 Meses</text:p>
          </table:table-cell>
          <table:table-cell table:style-name="ce38" office:value-type="date" office:date-value="2035-11-02" calcext:value-type="date">
            <text:p>nov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TORQUE)</text:p>
          </table:table-cell>
          <table:table-cell office:value-type="string" calcext:value-type="string">
            <text:p>MS8005E113A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5];[.J$38];&quot;m&quot;)&amp;&quot; Meses&quot;;DATEDIF([.J$38];[.G45];&quot;m&quot;)&amp;&quot; Meses&quot;)" office:value-type="string" office:string-value="30 Meses" calcext:value-type="string">
            <text:p>30 Meses</text:p>
          </table:table-cell>
          <table:table-cell table:style-name="ce38" office:value-type="date" office:date-value="2028-12-03" calcext:value-type="date">
            <text:p>dez/2028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PRESSÃO)</text:p>
          </table:table-cell>
          <table:table-cell office:value-type="string" calcext:value-type="string">
            <text:p>AE3663163E0230 OU S2808-4B023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6];[.J$38];&quot;m&quot;)&amp;&quot; Meses&quot;;DATEDIF([.J$38];[.G46];&quot;m&quot;)&amp;&quot; Meses&quot;)" office:value-type="string" office:string-value="111 Meses" calcext:value-type="string">
            <text:p>111 Meses</text:p>
          </table:table-cell>
          <table:table-cell table:style-name="ce38" office:value-type="date" office:date-value="2035-09-04" calcext:value-type="date">
            <text:p>set/2035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RETURN)</text:p>
          </table:table-cell>
          <table:table-cell office:value-type="string" calcext:value-type="string">
            <text:p>AE3663163K0600 OU S2808-12-060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7];[.J$38];&quot;m&quot;)&amp;&quot; Meses&quot;;DATEDIF([.J$38];[.G47];&quot;m&quot;)&amp;&quot; Meses&quot;)" office:value-type="string" office:string-value="102 Meses" calcext:value-type="string">
            <text:p>102 Meses</text:p>
          </table:table-cell>
          <table:table-cell table:style-name="ce38" office:value-type="date" office:date-value="2034-12-05" calcext:value-type="date">
            <text:p>dez/2034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OIL HOSE TEFLON (SUPPLY)</text:p>
          </table:table-cell>
          <table:table-cell office:value-type="string" calcext:value-type="string">
            <text:p>AE3663163K0600 OU S2808-12-060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8];[.J$38];&quot;m&quot;)&amp;&quot; Meses&quot;;DATEDIF([.J$38];[.G48];&quot;m&quot;)&amp;&quot; Meses&quot;)" office:value-type="string" office:string-value="102 Meses" calcext:value-type="string">
            <text:p>102 Meses</text:p>
          </table:table-cell>
          <table:table-cell table:style-name="ce38" office:value-type="date" office:date-value="2034-12-06" calcext:value-type="date">
            <text:p>dez/2034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111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OTORES</text:p>
          </table:table-cell>
          <table:table-cell office:value-type="string" calcext:value-type="string">
            <text:p>HOSE OIL BREATHER</text:p>
          </table:table-cell>
          <table:table-cell office:value-type="string" calcext:value-type="string">
            <text:p>R221520 OU S51-14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49];[.J$38];&quot;m&quot;)&amp;&quot; Meses&quot;;DATEDIF([.J$38];[.G49];&quot;m&quot;)&amp;&quot; Meses&quot;)" office:value-type="string" office:string-value="86 Meses" calcext:value-type="string">
            <text:p>86 Meses</text:p>
          </table:table-cell>
          <table:table-cell table:style-name="ce38" office:value-type="date" office:date-value="2033-09-01" calcext:value-type="date">
            <text:p>set/2033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/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PITOT</text:p>
          </table:table-cell>
          <table:table-cell office:value-type="string" calcext:value-type="string">
            <text:p>S1495-4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0];[.J$38];&quot;m&quot;)&amp;&quot; Meses&quot;;DATEDIF([.J$38];[.G50];&quot;m&quot;)&amp;&quot; Meses&quot;)" office:value-type="string" office:string-value="47 Meses" calcext:value-type="string">
            <text:p>47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PA</text:p>
          </table:table-cell>
          <table:table-cell office:value-type="string" calcext:value-type="string">
            <text:p>S1495-3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1];[.J$38];&quot;m&quot;)&amp;&quot; Meses&quot;;DATEDIF([.J$38];[.G51];&quot;m&quot;)&amp;&quot; Meses&quot;)" office:value-type="string" office:string-value="47 Meses" calcext:value-type="string">
            <text:p>47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FUEL HOSE (TQ/ASA)</text:p>
          </table:table-cell>
          <table:table-cell office:value-type="string" calcext:value-type="string">
            <text:p>R221485 OU S51-8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2];[.J$38];&quot;m&quot;)&amp;&quot; Meses&quot;;DATEDIF([.J$38];[.G52];&quot;m&quot;)&amp;&quot; Meses&quot;)" office:value-type="string" office:string-value="65 Meses" calcext:value-type="string">
            <text:p>65 Meses</text:p>
          </table:table-cell>
          <table:table-cell table:style-name="ce38" office:value-type="date" office:date-value="2031-12-01" calcext:value-type="date">
            <text:p>dez/2031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 office:value-type="date" office:date-value="2031-12-01" calcext:value-type="date">
            <text:p>dez/2031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FUEL HOSE (TANQUINHO)</text:p>
          </table:table-cell>
          <table:table-cell office:value-type="string" calcext:value-type="string">
            <text:p>R221487 OU S51-10-10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3];[.J$38];&quot;m&quot;)&amp;&quot; Meses&quot;;DATEDIF([.J$38];[.G53];&quot;m&quot;)&amp;&quot; Meses&quot;)" office:value-type="string" office:string-value="32 Meses" calcext:value-type="string">
            <text:p>32 Meses</text:p>
          </table:table-cell>
          <table:table-cell table:style-name="ce38" office:value-type="date" office:date-value="2029-03-01" calcext:value-type="date">
            <text:p>mar/2029</text:p>
          </table:table-cell>
          <table:table-cell/>
          <table:table-cell office:value-type="string" calcext:value-type="string">
            <text:p>10 ANOS OU TBO MOTOR</text:p>
          </table:table-cell>
          <table:table-cell table:style-name="ce50" office:value-type="date" office:date-value="2029-03-01" calcext:value-type="date">
            <text:p>mar/2029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INSTRUMENTOS</text:p>
          </table:table-cell>
          <table:table-cell office:value-type="string" calcext:value-type="string">
            <text:p>MANGUEIRAS DO GYRO</text:p>
          </table:table-cell>
          <table:table-cell office:value-type="string" calcext:value-type="string">
            <text:p>S1495-6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4];[.J$38];&quot;m&quot;)&amp;&quot; Meses&quot;;DATEDIF([.J$38];[.G54];&quot;m&quot;)&amp;&quot; Meses&quot;)" office:value-type="string" office:string-value="47 Meses" calcext:value-type="string">
            <text:p>47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ÉLULA</text:p>
          </table:table-cell>
          <table:table-cell office:value-type="string" calcext:value-type="string">
            <text:p>MANGUEIRAS DO TKS</text:p>
          </table:table-cell>
          <table:table-cell office:value-type="string" calcext:value-type="string">
            <text:p>S1495-6</text:p>
          </table:table-cell>
          <table:table-cell office:value-type="string" calcext:value-type="string">
            <text:p>NIL</text:p>
          </table:table-cell>
          <table:table-cell table:style-name="ce27" office:value-type="string" calcext:value-type="string">
            <text:p>FAB 2742</text:p>
          </table:table-cell>
          <table:table-cell table:style-name="ce87" table:formula="of:=IFERROR(&quot;- &quot;&amp;DATEDIF([.G55];[.J$38];&quot;m&quot;)&amp;&quot; Meses&quot;;DATEDIF([.J$38];[.G55];&quot;m&quot;)&amp;&quot; Meses&quot;)" office:value-type="string" office:string-value="47 Meses" calcext:value-type="string">
            <text:p>47 Meses</text:p>
          </table:table-cell>
          <table:table-cell table:style-name="ce38" office:value-type="date" office:date-value="2030-06-01" calcext:value-type="date">
            <text:p>jun/2030</text:p>
          </table:table-cell>
          <table:table-cell/>
          <table:table-cell office:value-type="string" calcext:value-type="string">
            <text:p>10 ANOS</text:p>
          </table:table-cell>
          <table:table-cell table:style-name="ce50" office:value-type="date" office:date-value="2030-06-01" calcext:value-type="date">
            <text:p>jun/2030</text:p>
          </table:table-cell>
          <table:table-cell/>
          <table:table-cell table:style-name="Default" table:number-columns-repeated="16373"/>
        </table:table-row>
        <table:table-row table:style-name="ro2">
          <table:table-cell table:number-columns-repeated="4"/>
          <table:table-cell table:style-name="ce27"/>
          <table:table-cell/>
          <table:table-cell table:style-name="ce38"/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65" office:value-type="string" calcext:value-type="string" table:number-columns-spanned="9" table:number-rows-spanned="2">
            <text:p>UMA LINHA PARA CADA INSPEÇÃO QUE VENCE, MESMO SENDO O MESMO ITEM</text:p>
          </table:table-cell>
          <table:covered-table-cell table:number-columns-repeated="8" table:style-name="ce65"/>
          <table:table-cell table:number-columns-repeated="2"/>
          <table:table-cell table:style-name="Default" table:number-columns-repeated="16373"/>
        </table:table-row>
        <table:table-row table:style-name="ro2">
          <table:covered-table-cell table:number-columns-repeated="9" table:style-name="ce65"/>
          <table:table-cell table:number-columns-repeated="2"/>
          <table:table-cell table:style-name="Default" table:number-columns-repeated="16373"/>
        </table:table-row>
        <table:table-row table:style-name="ro2" table:number-rows-repeated="3">
          <table:table-cell table:style-name="ce65" table:number-columns-repeated="9"/>
          <table:table-cell table:number-columns-repeated="2"/>
          <table:table-cell table:style-name="Default" table:number-columns-repeated="16373"/>
        </table:table-row>
        <table:table-row table:style-name="ro4">
          <table:table-cell table:style-name="ce8"/>
          <table:table-cell table:style-name="ce11" table:number-columns-repeated="4"/>
          <table:table-cell table:style-name="ce31"/>
          <table:table-cell table:style-name="ce11"/>
          <table:table-cell table:style-name="ce45" table:number-columns-repeated="2"/>
          <table:table-cell table:style-name="ce11" table:number-columns-repeated="2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1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12" table:number-columns-repeated="3"/>
          <table:table-cell table:style-name="ce55"/>
          <table:table-cell table:style-name="ce53" table:number-columns-repeated="16373"/>
        </table:table-row>
        <table:table-row table:style-name="ro5" table:visibility="collapse">
          <table:table-cell office:value-type="string" calcext:value-type="string">
            <text:p>CÉLULA</text:p>
          </table:table-cell>
          <table:table-cell office:value-type="string" calcext:value-type="string">
            <text:p>FLUIDO DO TKS</text:p>
          </table:table-cell>
          <table:table-cell office:value-type="string" calcext:value-type="string">
            <text:p>AVL-TKS2.5CS OU </text:p>
            <text:p>AEROSHELL COMPOUND7</text:p>
          </table:table-cell>
          <table:table-cell office:value-type="string" calcext:value-type="string">
            <text:p>XXXXXX</text:p>
          </table:table-cell>
          <table:table-cell table:style-name="ce27" office:value-type="string" calcext:value-type="string">
            <text:p>FAB 2742</text:p>
          </table:table-cell>
          <table:table-cell table:formula="of:=DATEDIF([.J$38];[.G85];&quot;m&quot;)&amp;&quot; Meses&quot;" office:value-type="string" office:string-value="" calcext:value-type="error">
            <text:p>Erro:502</text:p>
          </table:table-cell>
          <table:table-cell table:style-name="ce38" office:value-type="date" office:date-value="2026-02-25" calcext:value-type="date">
            <text:p>fev/2026</text:p>
          </table:table-cell>
          <table:table-cell/>
          <table:table-cell office:value-type="string" calcext:value-type="string">
            <text:p>15 MESES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4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3"/>
          <table:table-cell table:style-name="ce12" table:number-columns-repeated="3"/>
          <table:table-cell table:style-name="ce33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2"/>
          <table:table-cell table:style-name="ce51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12" table:number-columns-repeated="3"/>
          <table:table-cell table:style-name="ce56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12" table:number-columns-repeated="3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4"/>
          <table:table-cell table:style-name="ce18"/>
          <table:table-cell table:style-name="ce12" table:number-columns-repeated="2"/>
          <table:table-cell table:style-name="ce34"/>
          <table:table-cell table:style-name="ce23" table:number-columns-repeated="2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23"/>
          <table:table-cell table:style-name="ce46"/>
          <table:table-cell table:style-name="ce12" table:number-columns-repeated="2"/>
          <table:table-cell table:style-name="ce57"/>
          <table:table-cell table:style-name="ce53" table:number-columns-repeated="16373"/>
        </table:table-row>
        <table:table-row table:style-name="ro2" table:number-rows-repeated="3">
          <table:table-cell table:style-name="ce8"/>
          <table:table-cell table:style-name="ce12" table:number-columns-repeated="4"/>
          <table:table-cell table:style-name="ce33"/>
          <table:table-cell table:style-name="ce23"/>
          <table:table-cell table:style-name="ce12" table:number-columns-repeated="3"/>
          <table:table-cell table:style-name="ce58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 table:number-columns-repeated="4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11"/>
          <table:table-cell table:style-name="ce53" table:number-columns-repeated="16373"/>
        </table:table-row>
        <table:table-row table:style-name="ro2">
          <table:table-cell table:style-name="ce8"/>
          <table:table-cell table:style-name="ce12" table:number-columns-repeated="4"/>
          <table:table-cell table:style-name="ce34"/>
          <table:table-cell table:style-name="ce23"/>
          <table:table-cell table:style-name="ce47"/>
          <table:table-cell table:style-name="ce12" table:number-columns-repeated="3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7"/>
          <table:table-cell table:style-name="ce12"/>
          <table:table-cell table:style-name="ce24"/>
          <table:table-cell table:style-name="ce11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42"/>
          <table:table-cell table:style-name="ce46"/>
          <table:table-cell table:style-name="ce12"/>
          <table:table-cell table:style-name="ce23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23"/>
          <table:table-cell table:style-name="ce46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2"/>
          <table:table-cell table:style-name="ce12"/>
          <table:table-cell table:style-name="ce48"/>
          <table:table-cell table:style-name="ce12"/>
          <table:table-cell table:style-name="ce23"/>
          <table:table-cell table:style-name="ce12"/>
          <table:table-cell table:style-name="ce53" table:number-columns-repeated="16373"/>
        </table:table-row>
        <table:table-row table:style-name="ro2" table:number-rows-repeated="6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2"/>
          <table:table-cell table:style-name="ce46"/>
          <table:table-cell table:style-name="ce12"/>
          <table:table-cell table:style-name="ce23"/>
          <table:table-cell table:style-name="ce59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2"/>
          <table:table-cell table:style-name="ce46"/>
          <table:table-cell table:style-name="ce12"/>
          <table:table-cell table:style-name="ce23"/>
          <table:table-cell table:style-name="ce5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>
          <table:table-cell table:style-name="ce8"/>
          <table:table-cell table:style-name="ce15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5"/>
          <table:table-cell table:style-name="ce23" table:number-columns-repeated="2"/>
          <table:table-cell table:style-name="ce12" table:number-columns-repeated="2"/>
          <table:table-cell table:style-name="ce59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6"/>
          <table:table-cell table:style-name="ce12"/>
          <table:table-cell table:style-name="ce23"/>
          <table:table-cell table:style-name="ce12" table:number-columns-repeated="2"/>
          <table:table-cell table:style-name="ce11"/>
          <table:table-cell table:style-name="ce53" table:number-columns-repeated="16373"/>
        </table:table-row>
        <table:table-row table:style-name="ro2" table:number-rows-repeated="5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4"/>
          <table:table-cell table:style-name="ce12"/>
          <table:table-cell table:style-name="ce46"/>
          <table:table-cell table:style-name="ce12" table:number-columns-repeated="2"/>
          <table:table-cell table:style-name="ce58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23" table:number-columns-repeated="2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3"/>
          <table:table-cell table:style-name="ce43"/>
          <table:table-cell table:style-name="ce23"/>
          <table:table-cell table:style-name="ce12" table:number-columns-repeated="2"/>
          <table:table-cell table:style-name="ce15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24"/>
          <table:table-cell table:style-name="ce12"/>
          <table:table-cell table:style-name="ce34"/>
          <table:table-cell table:style-name="ce23"/>
          <table:table-cell table:style-name="ce46"/>
          <table:table-cell table:style-name="ce12"/>
          <table:table-cell table:style-name="ce52"/>
          <table:table-cell table:style-name="ce57"/>
          <table:table-cell table:style-name="ce53" table:number-columns-repeated="16373"/>
        </table:table-row>
        <table:table-row table:style-name="ro2" table:number-rows-repeated="2">
          <table:table-cell table:style-name="ce8"/>
          <table:table-cell table:style-name="ce12"/>
          <table:table-cell table:style-name="ce17"/>
          <table:table-cell table:style-name="ce12" table:number-columns-repeated="2"/>
          <table:table-cell table:style-name="ce37"/>
          <table:table-cell table:style-name="ce12"/>
          <table:table-cell table:style-name="ce23"/>
          <table:table-cell table:style-name="ce12" table:number-columns-repeated="2"/>
          <table:table-cell table:style-name="ce57"/>
          <table:table-cell table:style-name="ce53" table:number-columns-repeated="16373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34"/>
          <table:table-cell table:style-name="ce12"/>
          <table:table-cell table:style-name="ce46"/>
          <table:table-cell table:style-name="ce12"/>
          <table:table-cell table:style-name="ce52"/>
          <table:table-cell table:style-name="ce24"/>
          <table:table-cell table:style-name="ce53" table:number-columns-repeated="16373"/>
        </table:table-row>
        <table:table-row table:style-name="ro2" table:number-rows-repeated="8">
          <table:table-cell table:style-name="ce8" table:number-columns-repeated="3"/>
          <table:table-cell table:style-name="ce25" table:number-columns-repeated="5"/>
          <table:table-cell table:style-name="ce8"/>
          <table:table-cell table:style-name="ce53" table:number-columns-repeated="16375"/>
        </table:table-row>
        <table:table-row table:style-name="ro2" table:number-rows-repeated="5">
          <table:table-cell table:style-name="ce9" table:number-columns-repeated="3"/>
          <table:table-cell table:style-name="ce26" table:number-columns-repeated="5"/>
          <table:table-cell table:style-name="ce9"/>
          <table:table-cell table:style-name="ce54" table:number-columns-repeated="16375"/>
        </table:table-row>
        <table:table-row table:style-name="ro2" table:number-rows-repeated="1048422">
          <table:table-cell table:number-columns-repeated="11"/>
          <table:table-cell table:style-name="Default" table:number-columns-repeated="16373"/>
        </table:table-row>
        <table:table-row table:style-name="ro6">
          <table:table-cell table:number-columns-repeated="11"/>
          <table:table-cell table:style-name="Default" table:number-columns-repeated="16373"/>
        </table:table-row>
        <table:table-row table:style-name="ro6">
          <table:table-cell table:number-columns-repeated="11"/>
          <table:table-cell table:style-name="Default" table:number-columns-repeated="16373"/>
        </table:table-row>
        <calcext:sparkline-groups>
          <calcext:sparkline-group calcext:id="{6DB16E34-E234-44D6-87C1-909806579143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Controle de Vencimentos'.A1" calcext:data-range="'Controle de Vencimentos'.F15:'Controle de Vencimentos'.F15"/>
            </calcext:sparklines>
          </calcext:sparkline-group>
        </calcext:sparkline-groups>
      </table:table>
      <table:table table:name="'file:///R:/SUBCOMANDO/3.SCAV/PLACON/2026_nova/CONTROLE_INSPE%C3%87%C3%95ES_VENCIMENTOS.ods'#Controle_de_Vencimentos_C-98_CINDACTA-II" table:print="false" table:style-name="ta_extref">
        <table:table-source xlink:type="simple" xlink:href="../../../CONTROLE_INSPE%C3%87%C3%95ES_VENCIMENTOS.ods" table:table-name="Controle_de_Vencimentos_C-98_CINDACTA-II" table:filter-name="calc8" table:mode="copy-results-only"/>
        <table:table-column table:number-columns-repeated="7"/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 office:value-type="float" office:value="138.399305555556">
            <text:p>138.399305555556</text:p>
          </table:table-cell>
        </table:table-row>
        <table:table-row>
          <table:table-cell table:number-columns-repeated="6"/>
          <table:table-cell table:style-name="ce1" office:value-type="float" office:value="61.1284722222222">
            <text:p>61.1284722222222</text:p>
          </table:table-cell>
        </table:table-row>
        <table:table-row>
          <table:table-cell table:number-columns-repeated="6"/>
          <table:table-cell table:style-name="ce1" office:value-type="float" office:value="220.996527777778">
            <text:p>220.996527777778</text:p>
          </table:table-cell>
        </table:table-row>
        <table:table-row table:number-rows-repeated="7">
          <table:table-cell table:number-columns-repeated="7"/>
        </table:table-row>
        <table:table-row>
          <table:table-cell table:number-columns-repeated="6"/>
          <table:table-cell table:style-name="ce1" office:value-type="float" office:value="207.138888888889">
            <text:p>207.138888888889</text:p>
          </table:table-cell>
        </table:table-row>
        <table:table-row>
          <table:table-cell table:number-columns-repeated="6"/>
          <table:table-cell table:style-name="ce1" office:value-type="float" office:value="26.6215277777778">
            <text:p>26.6215277777778</text:p>
          </table:table-cell>
        </table:table-row>
        <table:table-row>
          <table:table-cell table:number-columns-repeated="6"/>
          <table:table-cell table:style-name="ce1" office:value-type="float" office:value="116.361111111111">
            <text:p>116.361111111111</text:p>
          </table:table-cell>
        </table:table-row>
        <table:table-row>
          <table:table-cell table:number-columns-repeated="6"/>
          <table:table-cell table:style-name="ce1" office:value-type="float" office:value="94.7916666666667">
            <text:p>94.7916666666667</text:p>
          </table:table-cell>
        </table:table-row>
        <table:table-row>
          <table:table-cell table:number-columns-repeated="6"/>
          <table:table-cell table:style-name="ce1" office:value-type="float" office:value="2.97222222222222">
            <text:p>2.97222222222222</text:p>
          </table:table-cell>
        </table:table-row>
        <table:table-row>
          <table:table-cell table:number-columns-repeated="6"/>
          <table:table-cell table:style-name="ce1" office:value-type="float" office:value="2.97222222222222">
            <text:p>2.97222222222222</text:p>
          </table:table-cell>
        </table:table-row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3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 office:value-type="float" office:value="32.4826388888889">
            <text:p>32.4826388888889</text:p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13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4">
          <table:table-cell table:number-columns-repeated="7"/>
        </table:table-row>
        <table:table-row>
          <table:table-cell/>
          <table:table-cell table:style-name="ce1" office:value-type="float" office:value="5876">
            <text:p>5876</text:p>
          </table:table-cell>
        </table:table-row>
      </table:table>
      <table:named-expressions/>
      <table:database-ranges>
        <table:database-range table:name="__Anonymous_Sheet_DB__0" table:target-range-address="'Controle de Vencimentos'.A1:'Controle de Vencimentos'.I2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5P0" style:volatile="true">
      <number:day/>
      <number:text>-</number:text>
      <number:month number:textual="true"/>
    </number:date-style>
    <number:text-style style:name="N155">
      <number:text-content/>
      <style:map style:condition="value()&lt;=1.7976931348623157E+308" style:apply-style-name="N155P0"/>
    </number:text-style>
    <number:date-style style:name="N156">
      <number:day/>
      <number:text>/</number:text>
      <number:month/>
    </number:date-style>
    <number:date-style style:name="N157P0" style:volatile="true">
      <number:day/>
      <number:text>/</number:text>
      <number:month/>
    </number:date-style>
    <number:text-style style:name="N157">
      <number:text-content/>
      <style:map style:condition="value()&lt;=1.7976931348623157E+308" style:apply-style-name="N157P0"/>
    </number:text-style>
    <number:time-style style:name="N159P0" style:volatile="true">
      <number:hours/>
      <number:text>:</number:text>
      <number:minutes number:style="long"/>
    </number:time-style>
    <number:text-style style:name="N159">
      <number:text-content/>
      <style:map style:condition="value()&lt;=1.7976931348623157E+308" style:apply-style-name="N159P0"/>
    </number:text-style>
    <number:time-style style:name="N160" number:truncate-on-overflow="false">
      <number:hours number:style="long"/>
      <number:text>:</number:text>
      <number:minutes number:style="long"/>
    </number:time-style>
    <number:date-style style:name="N161">
      <number:day number:style="long"/>
    </number:date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67" number:truncate-on-overflow="false">
      <number:hours/>
      <number:text>:</number:text>
      <number:minutes number:style="long"/>
    </number:time-style>
    <number:date-style style:name="N168">
      <number:day/>
      <number:text> de </number:text>
      <number:month number:textual="true"/>
      <number:text> de </number:text>
      <number:year/>
    </number:date-style>
    <number:date-style style:name="N169P0" style:volatile="true">
      <number:day number:style="long"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157E+308" style:apply-style-name="N169P0"/>
    </number:text-style>
    <number:number-style style:name="N170P0" style:volatile="true">
      <number:number number:decimal-places="0" number:min-decimal-places="0" number:min-integer-digits="1"/>
    </number:number-style>
    <number:number-style style:name="N170">
      <style:text-properties fo:color="#ff0000"/>
      <number:number number:decimal-places="0" number:min-decimal-places="0" number:min-integer-digits="1"/>
      <style:map style:condition="value()&gt;=0" style:apply-style-name="N170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R$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2P2" style:volatile="true">
      <number:text> R$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4P2" style:volatile="true"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 R$ 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0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03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R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12P2" style:volatile="true">
      <number:text> R$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R$</number:text>
      <number:number number:decimal-places="0" number:min-decimal-places="0" number:min-integer-digits="1" number:grouping="true"/>
    </number:number-style>
    <number:number-style style:name="N214">
      <number:text>-R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R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R$</number:text>
      <number:number number:decimal-places="2" number:min-decimal-places="2" number:min-integer-digits="1" number:grouping="true"/>
    </number:number-style>
    <number:number-style style:name="N217">
      <number:text>-R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R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20P1" style:volatile="true">
      <number:text>-R$</number:text>
      <number:number number:decimal-places="0" number:min-decimal-places="0" number:min-integer-digits="1" number:grouping="true"/>
      <number:text> </number:text>
    </number:number-style>
    <number:number-style style:name="N220P2" style:volatile="true">
      <number:text> R$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R$</number:text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R$-</number:text>
      <number:number number:decimal-places="0" number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223" number:title="Definido pelo usuário">
      <number:month number:textual="true"/>
      <number:text>/</number:text>
      <number:year number:style="long"/>
    </number:date-style>
    <number:date-style style:name="N224">
      <number:day/>
      <number:text>/</number:text>
      <number:month/>
      <number:text>/</number:text>
      <number:year/>
    </number:date-style>
    <number:date-style style:name="N225P0" style:volatile="true">
      <number:day/>
      <number:text>/</number:text>
      <number:month/>
      <number:text>/</number:text>
      <number:year/>
    </number:date-style>
    <number:text-style style:name="N225">
      <number:text-content/>
      <style:map style:condition="value()&lt;=1.7976931348623157E+308" style:apply-style-name="N225P0"/>
    </number:text-style>
    <number:date-style style:name="N22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8P0" style:volatile="true">
      <number:text>Sim</number:text>
    </number:number-style>
    <number:number-style style:name="N228P1" style:volatile="true">
      <number:text>Sim</number:text>
    </number:number-style>
    <number:number-style style:name="N228">
      <number:text>Não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Verdadeiro</number:text>
    </number:number-style>
    <number:number-style style:name="N230P1" style:volatile="true">
      <number:text>Verdadeiro</number:text>
    </number:number-style>
    <number:number-style style:name="N230">
      <number:text>Fals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Ativar</number:text>
    </number:number-style>
    <number:number-style style:name="N232P1" style:volatile="true">
      <number:text>Ativar</number:text>
    </number:number-style>
    <number:number-style style:name="N232">
      <number:text>Desativar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time-style style:name="N236P0" style:volatile="true">
      <number:hours/>
      <number:text>:</number:text>
      <number:minutes number:style="long"/>
      <number:text>:</number:text>
      <number:seconds number:style="long"/>
    </number:time-style>
    <number:text-style style:name="N236">
      <number:text-content/>
      <style:map style:condition="value()&lt;=1.7976931348623157E+308" style:apply-style-name="N236P0"/>
    </number:text-style>
    <number:number-style style:name="N238P0" style:volatile="true">
      <number:number number:decimal-places="2" number:min-decimal-places="2" number:min-integer-digits="1"/>
      <number:text> </number:text>
    </number:number-style>
    <number:number-style style:name="N238">
      <number:text>(</number:text>
      <number:number number:decimal-places="2" number:min-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0" number:min-decimal-places="0" number:min-integer-digits="5"/>
    </number:number-style>
    <number:date-style style:name="N240">
      <number:day/>
      <number:text>-</number:text>
      <number:month number:textual="true"/>
      <number:text>-</number:text>
      <number:year/>
    </number:date-style>
    <number:date-style style:name="N242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3">
      <number:day number:style="long"/>
      <number:text> </number:text>
      <number:month number:textual="true"/>
      <number:text> </number:text>
      <number:year number:style="long"/>
    </number:date-style>
    <number:date-style style:name="N244">
      <number:day/>
    </number:date-style>
    <number:number-style style:name="N245">
      <number:number number:decimal-places="0" number:min-decimal-places="0" number:min-integer-digits="0"/>
    </number:number-style>
    <number:number-style style:name="N246">
      <number:number number:decimal-places="0" number:min-decimal-places="0" number:min-integer-digits="2"/>
    </number:number-style>
    <number:time-style style:name="N247" number:truncate-on-overflow="false">
      <number:hours number:style="long"/>
      <number:text>H</number:text>
    </number:time-style>
    <number:number-style style:name="N248">
      <number:number number:decimal-places="1" number:min-decimal-places="1" number:min-integer-digits="1" number:grouping="true"/>
    </number:number-style>
    <number:time-style style:name="N249" number:truncate-on-overflow="false">
      <number:minutes number:style="long"/>
    </number:time-style>
    <number:time-style style:name="N250" number:truncate-on-overflow="false">
      <number:hours number:style="long"/>
      <number:text>:</number:text>
      <number:minutes number:style="long"/>
      <number:text>:</number:text>
    </number:time-style>
    <number:time-style style:name="N251" number:truncate-on-overflow="false">
      <number:hours number:style="long"/>
      <number:text>FH</number:text>
    </number:time-style>
    <number:time-style style:name="N252" number:truncate-on-overflow="false">
      <number:hours number:style="long"/>
    </number:time-style>
    <number:currency-style style:name="N254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54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54P0"/>
    </number:currency-style>
    <number:time-style style:name="N255" number:truncate-on-overflow="false">
      <number:hours number:style="long"/>
      <number:text> H</number:text>
    </number:time-style>
    <number:date-style style:name="N2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57">
      <number:day number:style="long"/>
      <number:text> </number:text>
      <number:month number:textual="true"/>
    </number:date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fill-character> </number:fill-character>
      <number:text>-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41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43P0" style:volatile="true" number:language="pt" number:country="BR">
      <number:month number:style="long" number:textual="true"/>
      <number:text>-</number:text>
      <number:year/>
    </number:date-style>
    <number:text-style style:name="N10143" number:language="pt" number:country="BR">
      <number:text-content/>
      <style:map style:condition="value()&lt;=1.7976931348623157E+308" style:apply-style-name="N10143P0"/>
    </number:text-style>
    <number:date-style style:name="N10145P0" style:volatile="true" number:language="pt" number:country="BR">
      <number:day number:style="long"/>
      <number:text>-</number:text>
      <number:month number:textual="true"/>
      <number:text>-</number:text>
      <number:year/>
    </number:date-style>
    <number:text-style style:name="N10145" number:language="pt" number:country="BR">
      <number:text-content/>
      <style:map style:condition="value()&lt;=1.7976931348623157E+308" style:apply-style-name="N10145P0"/>
    </number:text-style>
    <number:date-style style:name="N10147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47" number:language="pt" number:country="BR">
      <number:text-content/>
      <style:map style:condition="value()&lt;=1.7976931348623157E+308" style:apply-style-name="N10147P0"/>
    </number:text-style>
    <number:date-style style:name="N10149P0" style:volatile="true" number:language="pt" number:country="BR">
      <number:month number:textual="true"/>
      <number:text>-</number:text>
      <number:year/>
    </number:date-style>
    <number:text-style style:name="N10149" number:language="pt" number:country="BR">
      <number:text-content/>
      <style:map style:condition="value()&lt;=1.7976931348623157E+308" style:apply-style-name="N10149P0"/>
    </number:text-style>
    <number:date-style style:name="N10151P0" style:volatile="true" number:language="pt" number:country="BR">
      <number:day/>
      <number:text>  </number:text>
      <number:month number:style="long" number:textual="true"/>
      <number:text>, </number:text>
      <number:year number:style="long"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3P0" style:volatile="true" number:language="pt" number:country="BR">
      <number:day/>
      <number:text>-</number:text>
      <number:month number:textual="true"/>
    </number:date-style>
    <number:text-style style:name="N10153" number:language="pt" number:country="BR">
      <number:text-content/>
      <style:map style:condition="value()&lt;=1.7976931348623157E+308" style:apply-style-name="N10153P0"/>
    </number:text-style>
    <number:currency-style style:name="N1015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57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7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57P2" style:volatile="true" number:language="pt" number:country="BR">
      <number:text>- </number:text>
    </number:number-style>
    <number:text-style style:name="N10157" number:language="pt" number:country="B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pt" number:country="BR" number:truncate-on-overflow="false">
      <number:hours/>
      <number:text>:</number:text>
      <number:minutes number:style="long"/>
    </number:time-style>
    <number:date-style style:name="N20130P0" style:volatile="true" number:language="en" number:country="US">
      <number:day/>
      <number:text>/</number:text>
      <number:month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30" number:language="en" number:country="US">
      <number:text-content/>
      <style:map style:condition="value()&lt;=1.7976931348623157E+308" style:apply-style-name="N20130P0"/>
    </number:text-style>
    <number:currency-style style:name="N2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3P0"/>
    </number:currency-style>
    <number:currency-style style:name="N2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6P0"/>
    </number:currency-style>
    <number:date-style style:name="N20137" number:language="en" number:country="US">
      <number:month/>
      <number:text>/</number:text>
      <number:day/>
      <number:text>/</number:text>
      <number:year number:style="long"/>
    </number:date-style>
    <number:date-style style:name="N20138" number:language="en" number:country="US">
      <number:day/>
      <number:text>-</number:text>
      <number:month number:textual="true"/>
      <number:text>-</number:text>
      <number:year/>
    </number:date-style>
    <number:date-style style:name="N20139" number:language="en" number:country="US">
      <number:day/>
      <number:text>-</number:text>
      <number:month number:textual="true"/>
    </number:date-style>
    <number:date-style style:name="N20140" number:language="en" number:country="US">
      <number:month number:textual="true"/>
      <number:text>-</number:text>
      <number:year/>
    </number:date-style>
    <number:time-style style:name="N20141" number:language="en" number:country="US">
      <number:hours/>
      <number:text>:</number:text>
      <number:minutes number:style="long"/>
      <number:text> </number:text>
      <number:am-pm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3" number:language="en" number:country="US">
      <number:hours/>
      <number:text>:</number:text>
      <number:minutes number:style="long"/>
    </number:time-style>
    <number:time-style style:name="N2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7P0"/>
    </number:number-style>
    <number:number-style style:name="N2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9P0"/>
    </number:number-style>
    <number:number-style style:name="N2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3P2" style:volatile="true" number:language="en" number:country="US">
      <number:text> </number:text>
      <number:fill-character> </number:fill-character>
      <number:text>- </number:text>
    </number:number-style>
    <number:text-style style:name="N20153" number:language="en" number:country="US">
      <number:text> </number:text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currency-style style:name="N2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7P2" style:volatile="true" number:language="en" number:country="US">
      <number:currency-symbol/>
      <number:fill-character> </number:fill-character>
      <number:text>- </number:text>
    </number:currency-style>
    <number:text-style style:name="N20157" number:language="en" number:country="US">
      <number:text> </number:text>
      <number:text-content/>
      <number:text> </number:text>
      <style:map style:condition="value()&gt;0" style:apply-style-name="N20157P0"/>
      <style:map style:condition="value()&lt;0" style:apply-style-name="N20157P1"/>
      <style:map style:condition="value()=0" style:apply-style-name="N20157P2"/>
    </number:text-style>
    <number:number-style style:name="N2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61" number:language="en" number:country="US">
      <number:text> </number:text>
      <number:text-content/>
      <number:text> </number:text>
      <style:map style:condition="value()&gt;0" style:apply-style-name="N20161P0"/>
      <style:map style:condition="value()&lt;0" style:apply-style-name="N20161P1"/>
      <style:map style:condition="value()=0" style:apply-style-name="N20161P2"/>
    </number:text-style>
    <number:currency-style style:name="N2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style:style style:name="Default" style:family="table-cell">
      <style:table-cell-properties style:rotation-align="none" style:vertical-align="bottom"/>
      <style:text-properties fo:color="#000000" style:font-name="Calibri2" fo:font-family="Calibri" style:font-family-generic="swiss" fo:font-size="11pt" style:font-size-asian="11pt" style:font-name-complex="Calibri2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17cm" fo:margin-bottom="0.9cm" fo:margin-left="0.919cm" fo:margin-right="1.06cm" style:print-page-order="ttb" style:first-page-number="continue" style:scale-to-X="1" style:scale-to-Y="1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5:18:52.88721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e_20_de_20_Vencimentos" style:display-name="PageStyle_Controle de Venci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18:02:32</meta:creation-date>
    <meta:initial-creator>openpyxl</meta:initial-creator>
    <dc:language>pt-BR</dc:language>
    <dc:date>2026-06-03T15:24:51.146617800</dc:date>
    <meta:editing-cycles>59</meta:editing-cycles>
    <meta:editing-duration>PT4H20M14S</meta:editing-duration>
    <meta:generator>LibreOffice/25.2.7.2$Windows_X86_64 LibreOffice_project/5cbfd1ab6520636bb5f7b99185aa69bd7456825d</meta:generator>
    <meta:print-date>2026-05-25T08:25:04.554985200</meta:print-date>
    <meta:document-statistic meta:table-count="1" meta:cell-count="422" meta:object-count="0"/>
    <meta:user-defined meta:name="AppVersion">15.0000</meta:user-defined>
  </office:meta>
</office:document-meta>
</file>